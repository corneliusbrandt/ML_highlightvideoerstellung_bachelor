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2.3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4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2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.00.0000</text:date>, <text:time style:data-style-name="N2" text:time-value="10:52:29.441297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15T10:57:23.800566600</dc:date>
    <meta:editing-duration>PT12H21M54S</meta:editing-duration>
    <meta:editing-cycles>31</meta:editing-cycles>
    <meta:generator>LibreOffice/25.8.4.2$Windows_X86_64 LibreOffice_project/290daaa01b999472f0c7a3890eb6a550fd74c6df</meta:generator>
    <meta:document-statistic meta:table-count="1" meta:cell-count="1468" meta:object-count="0"/>
  </office:meta>
</office:document-meta>
</file>